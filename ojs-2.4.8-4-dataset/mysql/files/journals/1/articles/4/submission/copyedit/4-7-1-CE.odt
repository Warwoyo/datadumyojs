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Copyediting Workflows for Lab Datasets</text:p>
      <text:p>Article 4 (CE) - synthetic lab content.</text:p>
      <text:p>This file was produced for a non-production OJS 2.4.8-4 SAST dataset.</text:p>
    </office:text>
  </office:body>
</office:document-content>
</file>